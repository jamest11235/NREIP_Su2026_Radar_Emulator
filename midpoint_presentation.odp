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line-height="200%"/>
    </style:style>
    <style:style style:name="P3" style:family="paragraph">
      <loext:graphic-properties draw:fill-color="#ffffff"/>
      <style:paragraph-properties fo:line-height="200%"/>
    </style:style>
    <style:style style:name="T1" style:family="text">
      <style:text-properties fo:color="#80808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 text:style-name="P2">USRP Radar Target Emulator</text:p>
            <text:p text:style-name="P2"><text:span text:style-name="T1">James Tang Midpoint Presentation NREIP Summer 20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FM Signal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ll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15T11:37:18.180929398</meta:creation-date>
    <dc:date>2026-07-15T11:41:40.289648644</dc:date>
    <meta:editing-duration>PT4M23S</meta:editing-duration>
    <meta:editing-cycles>1</meta:editing-cycles>
    <meta:document-statistic meta:object-count="31"/>
    <meta:generator>LibreOffice/26.2.4.2$Linux_X86_64 LibreOffice_project/620$Build-2</meta:generator>
  </office:meta>
</office:document-meta>
</file>